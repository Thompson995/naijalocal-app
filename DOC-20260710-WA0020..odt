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PAYSTACK_SECRET_KEY=sk_test_sk_live_8aba44a32dadb64dc642588b718bf8273e0ba009</text:p>
      <text:p text:style-name="Standard">PAYSTACK_PUBLIC_KEY=pk_test_pk_live_6811b71d1a57d21e2fe31dde19613c29d0246be8</text:p>
      <text:p text:style-name="Standard">PORT=4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 style:font-style-complex="normal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 style:font-style-complex="italic" style:font-weight-complex="normal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3" meta:character-count="161" meta:non-whitespace-character-count="161"/>
    <meta:generator>LibreOfficeDev/6.0.5.2$Linux_X86_64 LibreOffice_project/</meta:generator>
  </office:meta>
</office:document-meta>
</file>